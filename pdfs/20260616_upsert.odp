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3000001B89C460377.png" manifest:media-type="image/png"/>
  <manifest:file-entry manifest:full-path="Pictures/10000001000001970000015FCFBE476F.png" manifest:media-type="image/png"/>
  <manifest:file-entry manifest:full-path="Pictures/100063C800002A11000024476AA413E8.svg" manifest:media-type="image/svg+xml"/>
  <manifest:file-entry manifest:full-path="Pictures/1000000000000688000000741BAF699E.png" manifest:media-type="image/png"/>
  <manifest:file-entry manifest:full-path="Pictures/10003672000016F20000242CAD1293A8.svg" manifest:media-type="image/svg+xml"/>
  <manifest:file-entry manifest:full-path="Pictures/10000001000000DE0000015E155DE310.png" manifest:media-type="image/png"/>
  <manifest:file-entry manifest:full-path="Pictures/10000000000001CC000001CCED742A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8.76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6.52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9.574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fo:min-height="4.50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font-name="Fira Code" fo:font-size="24pt"/>
    </style:style>
    <style:style style:name="P5" style:family="paragraph">
      <loext:graphic-properties draw:fill="none"/>
      <style:text-properties style:font-name="Fira Code" fo:font-size="24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/>
    </style:style>
    <style:style style:name="P9" style:family="paragraph">
      <loext:graphic-properties draw:fill="non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</style:style>
    <style:style style:name="T1" style:family="text">
      <style:text-properties style:font-name="Fira Code" fo:font-size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505cm" svg:x="1.471cm" svg:y="5.323cm" presentation:class="title" presentation:user-transformed="true">
          <draw:text-box>
            <text:p>upsert なのに INSERT <text:line-break/>が2回実行されていた</text:p>
          </draw:text-box>
        </draw:frame>
        <draw:frame presentation:style-name="pr1" draw:layer="layout" svg:width="25.199cm" svg:height="4.505cm" svg:x="15.934cm" svg:y="7.719cm" presentation:class="title" presentation:user-transformed="true">
          <draw:text-box>
            <text:p/>
          </draw:text-box>
        </draw:frame>
        <draw:frame presentation:style-name="pr1" draw:layer="layout" svg:width="25.199cm" svg:height="4.505cm" svg:x="14.621cm" svg:y="7.599cm" presentation:class="title" presentation:user-transformed="true">
          <draw:text-box>
            <text:p/>
          </draw:text-box>
        </draw:frame>
        <draw:frame draw:style-name="gr1" draw:text-style-name="P1" draw:layer="layout" svg:width="1.382cm" svg:height="1.382cm" svg:x="20.32cm" svg:y="13.97cm">
          <draw:image xlink:href="Pictures/10000000000001CC000001CCED742A5C.png" xlink:type="simple" xlink:show="embed" xlink:actuate="onLoad" draw:mime-type="image/png">
            <text:p/>
          </draw:image>
        </draw:frame>
        <draw:frame draw:style-name="gr2" draw:text-style-name="P2" draw:layer="layout" svg:width="5.36cm" svg:height="1.17cm" svg:x="21.702cm" svg:y="13.97cm">
          <draw:text-box>
            <text:p>diago@スタメン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データベースの upsert 操作、 便利ですよね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4" draw:text-style-name="P5" draw:layer="layout" svg:width="25.27cm" svg:height="9.015cm" svg:x="1.4cm" svg:y="4.32cm">
          <draw:text-box>
            <text:p text:style-name="P4"><text:span text:style-name="T1">// </text:span><text:span text:style-name="T1">指定</text:span><text:span text:style-name="T1">email</text:span><text:span text:style-name="T1">のユーザーがいれば更新、いなければ作成</text:span></text:p>
            <text:p text:style-name="P4"><text:span text:style-name="T1">await prisma.user.upsert({</text:span></text:p>
            <text:p text:style-name="P4"><text:span text:style-name="T1"><text:s text:c="2"/></text:span><text:span text:style-name="T1">where: { email: "user@example.com" },</text:span></text:p>
            <text:p text:style-name="P4"><text:span text:style-name="T1"><text:s text:c="2"/></text:span><text:span text:style-name="T1">update: { name: "admin" },</text:span></text:p>
            <text:p text:style-name="P4"><text:span text:style-name="T1"><text:s text:c="2"/></text:span><text:span text:style-name="T1">create: { email: "user@example.com", name: "admin" },</text:span></text:p>
            <text:p text:style-name="P4"><text:span text:style-name="T1">}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遭遇した事象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たまにupsert部分でユニーク制約エラーが出る</text:p>
              </text:list-item>
              <text:list-item>
                <text:p>すでにレコードがあるのに insert しようとす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?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発行されるSQLを眺めると、SELECT + (INSERT or UPDATE) の2クエリになっている</text:p>
              </text:list-item>
              <text:list-item>
                <text:p text:style-name="P6">同時に2つSELECTを通過して、両方INSERT している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7.143cm" svg:height="11.261cm" svg:x="7.202cm" svg:y="2.261cm">
          <draw:image xlink:href="Pictures/10003672000016F20000242CAD1293A8.svg" xlink:type="simple" xlink:show="embed" xlink:actuate="onLoad" draw:mime-type="image/svg+xml">
            <text:p/>
          </draw:image>
          <draw:image xlink:href="Pictures/10000001000000DE0000015E155DE310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13.529cm" svg:height="11.667cm" svg:x="7.254cm" svg:y="2.244cm">
          <draw:image xlink:href="Pictures/100063C800002A11000024476AA413E8.svg" xlink:type="simple" xlink:show="embed" xlink:actuate="onLoad" draw:mime-type="image/svg+xml">
            <text:p/>
          </draw:image>
          <draw:image xlink:href="Pictures/10000001000001970000015FCFBE476F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9" draw:layer="layout" svg:width="21.91cm" svg:height="8.193cm" svg:x="1.4cm" svg:y="3.685cm">
          <draw:text-box>
            <text:p text:style-name="P8"><text:span text:style-name="T2">ACTUALLY</text:span><text:span text:style-name="T2"><text:line-break/></text:span>2クエリの upsert</text:p>
            <text:p text:style-name="P8"/>
            <text:p text:style-name="P8">-- 1. SELECT で存在確認</text:p>
            <text:p text:style-name="P8">SELECT * FROM users WHERE email = <text:a xlink:href="mailto:'user@example.com" xlink:type="simple">'user@example.com</text:a>';<text:line-break/></text:p>
            <text:p text:style-name="P8">-- 2a. 見つかった → UPDATE</text:p>
            <text:p text:style-name="P8">UPDATE users SET name = 'admin' WHERE email = 'user@example.com';</text:p>
            <text:p text:style-name="P8">-- 2b. 見つからなかった → INSERT</text:p>
            <text:p text:style-name="P8">INSERT INTO users (email, name) VALUES ('user@example.com', 'admin');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6" draw:text-style-name="P11" draw:layer="layout" svg:width="21.91cm" svg:height="9.824cm" svg:x="1.4cm" svg:y="3.685cm">
          <draw:text-box>
            <text:p>EXPECT</text:p>
            <text:p>1クエリの upsert</text:p>
            <text:p/>
            <text:p>INSERT INTO users (email, name)</text:p>
            <text:p>VALUES ('user@example.com', 'admin')</text:p>
            <text:p text:style-name="P10"><text:span text:style-name="T2">ON CONFLICT (email) DO UPDATE SET name = 'admin'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なぜこうなる? -- Prisma ORMの仕様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データベースupsertは条件付きと書いてあ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4.632cm" svg:height="11.641cm" svg:x="1.709cm" svg:y="1.905cm">
          <draw:image xlink:href="Pictures/10000000000003A3000001B89C460377.png" xlink:type="simple" xlink:show="embed" xlink:actuate="onLoad" draw:mime-type="image/png">
            <text:p/>
          </draw:image>
        </draw:frame>
        <draw:frame draw:style-name="gr7" draw:text-style-name="P11" draw:layer="layout" svg:width="24.073cm" svg:height="0.963cm" svg:x="1.905cm" svg:y="13.97cm">
          <draw:text-box>
            <text:p>https://www.prisma.io/docs/orm/reference/prisma-client-reference#database-upsert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要するに: 単一テーブルの操作の場合しかDBレベルの upsert にならない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なぜこの仕様? -- SQLの制限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7.999cm" svg:height="1.941cm" svg:x="0cm" svg:y="6.314cm">
          <draw:image xlink:href="Pictures/1000000000000688000000741BAF699E.png" xlink:type="simple" xlink:show="embed" xlink:actuate="onLoad" draw:mime-type="image/png">
            <text:p/>
          </draw:image>
        </draw:frame>
        <draw:frame draw:style-name="gr7" draw:text-style-name="P11" draw:layer="layout" svg:width="15.746cm" svg:height="0.963cm" svg:x="5.844cm" svg:y="13.007cm">
          <draw:text-box>
            <text:p>https://www.postgresql.org/docs/current/sql-insert.htm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要するに: DO UPDATE SET ...では同テーブルのカラムしか操作できない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RMはケースによって異なるSQLを発行することがある</text:p>
              </text:list-item>
              <text:list-item>
                <text:p>ドキュメントの記載が厚いところはちゃんと読もう</text:p>
              </text:list-item>
            </text:list>
          </draw:text-box>
        </draw:frame>
        <draw:frame presentation:style-name="pr4" draw:layer="layout" svg:width="25.199cm" svg:height="9.134cm" svg:x="9.489cm" svg:y="4.71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完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0:58:49.470245153</meta:creation-date>
    <meta:generator>LibreOffice/24.2.7.2$Linux_X86_64 LibreOffice_project/420$Build-2</meta:generator>
    <dc:date>2026-06-16T23:06:34.663970171</dc:date>
    <meta:editing-duration>PT1H50M41S</meta:editing-duration>
    <meta:editing-cycles>10</meta:editing-cycles>
    <meta:document-statistic meta:object-count="113"/>
  </office:meta>
</office:document-meta>
</file>