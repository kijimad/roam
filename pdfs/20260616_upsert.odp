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3000001B89C460377.png" manifest:media-type="image/png"/>
  <manifest:file-entry manifest:full-path="Pictures/10000001000001970000015F5D878B6F.png" manifest:media-type="image/png"/>
  <manifest:file-entry manifest:full-path="Pictures/100063C800002A11000024476AA413E8.svg" manifest:media-type="image/svg+xml"/>
  <manifest:file-entry manifest:full-path="Pictures/1000000000000688000000741BAF699E.png" manifest:media-type="image/png"/>
  <manifest:file-entry manifest:full-path="Pictures/10000001000000DE0000015EA038F917.png" manifest:media-type="image/png"/>
  <manifest:file-entry manifest:full-path="Pictures/10003672000016F20000242CAD1293A8.svg" manifest:media-type="image/svg+xml"/>
  <manifest:file-entry manifest:full-path="Pictures/10000000000001CC000001CCED742A5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adornments="Regular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8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8.765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9.574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943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r1" style:family="presentation" style:parent-style-name="Default-title">
      <style:graphic-properties fo:min-height="4.50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text-properties style:font-name="Fira Code" fo:font-size="24pt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text-properties fo:font-size="18pt"/>
    </style:style>
    <style:style style:name="P9" style:family="paragraph">
      <loext:graphic-properties draw:fill="none"/>
    </style:style>
    <style:style style:name="T1" style:family="text">
      <style:text-properties style:font-name="Fira Code" fo:font-size="24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505cm" svg:x="1.471cm" svg:y="5.323cm" presentation:class="title" presentation:user-transformed="true">
          <draw:text-box>
            <text:p>upsert なのに INSERT <text:line-break/>が2回実行されていた</text:p>
          </draw:text-box>
        </draw:frame>
        <draw:frame presentation:style-name="pr1" draw:layer="layout" svg:width="25.199cm" svg:height="4.505cm" svg:x="15.934cm" svg:y="7.719cm" presentation:class="title" presentation:user-transformed="true">
          <draw:text-box>
            <text:p/>
          </draw:text-box>
        </draw:frame>
        <draw:frame presentation:style-name="pr1" draw:layer="layout" svg:width="25.199cm" svg:height="4.505cm" svg:x="14.621cm" svg:y="7.599cm" presentation:class="title" presentation:user-transformed="true">
          <draw:text-box>
            <text:p/>
          </draw:text-box>
        </draw:frame>
        <draw:frame draw:style-name="gr1" draw:text-style-name="P1" draw:layer="layout" svg:width="1.382cm" svg:height="1.382cm" svg:x="20.32cm" svg:y="13.97cm">
          <draw:image xlink:href="Pictures/10000000000001CC000001CCED742A5C.png" xlink:type="simple" xlink:show="embed" xlink:actuate="onLoad" draw:mime-type="image/png">
            <text:p/>
          </draw:image>
        </draw:frame>
        <draw:frame draw:style-name="gr2" draw:text-style-name="P2" draw:layer="layout" svg:width="5.36cm" svg:height="1.17cm" svg:x="21.702cm" svg:y="13.97cm">
          <draw:text-box>
            <text:p>diago@スタメン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データベースの upsert 操作、 便利ですよね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4" draw:text-style-name="P4" draw:layer="layout" svg:width="25.27cm" svg:height="9.015cm" svg:x="1.4cm" svg:y="4.32cm">
          <draw:text-box>
            <text:p><text:span text:style-name="T1">// </text:span><text:span text:style-name="T1">指定</text:span><text:span text:style-name="T1">email</text:span><text:span text:style-name="T1">のユーザーがいれば更新、いなければ作成</text:span></text:p>
            <text:p><text:span text:style-name="T1">await prisma.user.upsert({</text:span></text:p>
            <text:p><text:span text:style-name="T1"><text:s text:c="2"/></text:span><text:span text:style-name="T1">where: { email: "user@example.com" },</text:span></text:p>
            <text:p><text:span text:style-name="T1"><text:s text:c="2"/></text:span><text:span text:style-name="T1">update: { name: "admin" },</text:span></text:p>
            <text:p><text:span text:style-name="T1"><text:s text:c="2"/></text:span><text:span text:style-name="T1">create: { email: "user@example.com", name: "admin" },</text:span></text:p>
            <text:p><text:span text:style-name="T1">}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遭遇した事象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たまにupsert部分でユニーク制約エラーが出る。すでにレコードがあるのに insert しようとする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??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発行されるSQLは、SELECT + (INSERT or UPDATE) の2クエリになっている</text:p>
              </text:list-item>
              <text:list-item>
                <text:p text:style-name="P5">判定と作成が2クエリなのでその間にほかのクエリが実行される余地がある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7.143cm" svg:height="11.261cm" svg:x="7.202cm" svg:y="2.261cm">
          <draw:image xlink:href="Pictures/10003672000016F20000242CAD1293A8.svg" xlink:type="simple" xlink:show="embed" xlink:actuate="onLoad" draw:mime-type="image/svg+xml">
            <text:p/>
          </draw:image>
          <draw:image xlink:href="Pictures/10000001000000DE0000015EA038F917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13.529cm" svg:height="11.667cm" svg:x="7.254cm" svg:y="2.244cm">
          <draw:image xlink:href="Pictures/100063C800002A11000024476AA413E8.svg" xlink:type="simple" xlink:show="embed" xlink:actuate="onLoad" draw:mime-type="image/svg+xml">
            <text:p/>
          </draw:image>
          <draw:image xlink:href="Pictures/10000001000001970000015F5D878B6F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発行SQL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5" draw:text-style-name="P8" draw:layer="layout" svg:width="21.91cm" svg:height="9.824cm" svg:x="1.4cm" svg:y="3.685cm">
          <draw:text-box>
            <text:p><text:span text:style-name="T2">こんな感じになっている想定だったがそうなっていない</text:span></text:p>
            <text:p><text:span text:style-name="T2">1</text:span><text:span text:style-name="T2">クエリの </text:span><text:span text:style-name="T2">upsert</text:span></text:p>
            <text:p><text:span text:style-name="T2"/></text:p>
            <text:p><text:span text:style-name="T2">INSERT INTO users (email, name)</text:span></text:p>
            <text:p><text:span text:style-name="T2">VALUES ('user@example.com', 'admin')</text:span></text:p>
            <text:p text:style-name="P7"><text:span text:style-name="T3">ON CONFLICT (email) DO UPDATE SET name = 'admin'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発行SQ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6" draw:text-style-name="P8" draw:layer="layout" svg:width="21.91cm" svg:height="8.193cm" svg:x="1.4cm" svg:y="3.685cm">
          <draw:text-box>
            <text:p><text:span text:style-name="T3">ACTUALLY</text:span><text:span text:style-name="T3"><text:line-break/></text:span><text:span text:style-name="T2">2</text:span><text:span text:style-name="T2">クエリの </text:span><text:span text:style-name="T2">upsert</text:span></text:p>
            <text:p><text:span text:style-name="T2"/></text:p>
            <text:p><text:span text:style-name="T2">-- 1. SELECT </text:span><text:span text:style-name="T2">で存在確認</text:span></text:p>
            <text:p><text:span text:style-name="T2">SELECT * FROM users WHERE email = </text:span><text:span text:style-name="T2"><text:a xlink:href="mailto:'user@example.com" xlink:type="simple">'user@example.com</text:a></text:span><text:span text:style-name="T2">';</text:span><text:span text:style-name="T2"><text:line-break/></text:span><text:span text:style-name="T2"/></text:p>
            <text:p><text:span text:style-name="T2">-- 2a. </text:span><text:span text:style-name="T2">見つかった → </text:span><text:span text:style-name="T2">UPDATE</text:span></text:p>
            <text:p><text:span text:style-name="T2">UPDATE users SET name = 'admin' WHERE email = 'user@example.com';</text:span></text:p>
            <text:p><text:span text:style-name="T2">-- 2b. </text:span><text:span text:style-name="T2">見つからなかった → </text:span><text:span text:style-name="T2">INSERT</text:span></text:p>
            <text:p><text:span text:style-name="T2">INSERT INTO users (email, name) VALUES ('user@example.com', 'admin'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なぜこうなる? -- Prisma ORMの仕様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データベースupsertは条件付きと書いてある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24.632cm" svg:height="11.641cm" svg:x="1.709cm" svg:y="1.905cm">
          <draw:image xlink:href="Pictures/10000000000003A3000001B89C460377.png" xlink:type="simple" xlink:show="embed" xlink:actuate="onLoad" draw:mime-type="image/png">
            <text:p/>
          </draw:image>
        </draw:frame>
        <draw:frame draw:style-name="gr7" draw:text-style-name="P9" draw:layer="layout" svg:width="24.073cm" svg:height="0.963cm" svg:x="1.905cm" svg:y="13.97cm">
          <draw:text-box>
            <text:p>https://www.prisma.io/docs/orm/reference/prisma-client-reference#database-upserts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要するに: 単一テーブルの操作の場合しかDBレベルの upsert にならない</text:p>
              </text:list-item>
              <text:list-item>
                <text:p>問題になったupsertコードでは別のテーブルを参照していたため、DBレベルのupsertを使えず2クエリにフォールバックしていた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なぜこの仕様? -- データベースのupsertの制限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27.999cm" svg:height="1.941cm" svg:x="0cm" svg:y="6.314cm">
          <draw:image xlink:href="Pictures/1000000000000688000000741BAF699E.png" xlink:type="simple" xlink:show="embed" xlink:actuate="onLoad" draw:mime-type="image/png">
            <text:p/>
          </draw:image>
        </draw:frame>
        <draw:frame draw:style-name="gr7" draw:text-style-name="P9" draw:layer="layout" svg:width="15.746cm" svg:height="0.963cm" svg:x="5.844cm" svg:y="13.007cm">
          <draw:text-box>
            <text:p>https://www.postgresql.org/docs/current/sql-insert.html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要するに: ON CONFLICT DO UPDATE SET … (DB upsert)では同一テーブルのカラムしか操作できない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まとめ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Bの仕様に合わせて、ORMの発行するクエリが状況によって変わっていた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教訓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ドキュメントの記載が厚いところは意味がある。ちゃんと読もう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完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adornments="Regular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0:58:49.470245153</meta:creation-date>
    <meta:generator>LibreOffice/24.2.7.2$Linux_X86_64 LibreOffice_project/420$Build-2</meta:generator>
    <dc:date>2026-06-17T08:55:58.360498760</dc:date>
    <meta:editing-duration>PT10H51M11S</meta:editing-duration>
    <meta:editing-cycles>18</meta:editing-cycles>
    <meta:document-statistic meta:object-count="116"/>
  </office:meta>
</office:document-meta>
</file>